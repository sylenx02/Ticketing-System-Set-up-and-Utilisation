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A00000323854A65DD60A2AD8C.jpg" manifest:media-type="image/jpeg"/>
  <manifest:file-entry manifest:full-path="Pictures/100000000000043200000136D3A5018C283F7015.jpg" manifest:media-type="image/jpeg"/>
  <manifest:file-entry manifest:full-path="Pictures/100000000000034B000001E191B8B8799D6B6601.jpg" manifest:media-type="image/jpeg"/>
  <manifest:file-entry manifest:full-path="Pictures/10000000000003F30000014A816F42A4D0C98E09.jpg" manifest:media-type="image/jpeg"/>
  <manifest:file-entry manifest:full-path="Pictures/10000000000002BE000001ED0D0B9B266D1264CE.jpg" manifest:media-type="image/jpeg"/>
  <manifest:file-entry manifest:full-path="Pictures/100000000000026F000001A10683B365182FC73C.jpg" manifest:media-type="image/jpeg"/>
  <manifest:file-entry manifest:full-path="Pictures/10000000000002020000015058B7B522FE4605D2.jpg" manifest:media-type="image/jpeg"/>
  <manifest:file-entry manifest:full-path="Pictures/100000000000033800000141059D8A352FA7555E.jpg" manifest:media-type="image/jpeg"/>
  <manifest:file-entry manifest:full-path="Pictures/100000000000043E00000187FB5BFCD9EAC62C55.jpg" manifest:media-type="image/jpeg"/>
  <manifest:file-entry manifest:full-path="Pictures/100000000000033600000380DD5E78FA7AD1D312.jpg" manifest:media-type="image/jpeg"/>
  <manifest:file-entry manifest:full-path="Pictures/10000000000001DB0000019880E1C83B613C2C6F.jpg" manifest:media-type="image/jpeg"/>
  <manifest:file-entry manifest:full-path="Pictures/10000000000002E9000000971689D1FD179F2EB6.jpg" manifest:media-type="image/jpeg"/>
  <manifest:file-entry manifest:full-path="Pictures/10000000000001F400000032976CFF2E08986AD6.jpg" manifest:media-type="image/jpeg"/>
  <manifest:file-entry manifest:full-path="Pictures/10000000000001A300000020105AC9406A91F7A7.jpg" manifest:media-type="image/jpeg"/>
  <manifest:file-entry manifest:full-path="Pictures/100000000000033C0000029D74D09E70C860D1EC.jpg" manifest:media-type="image/jpeg"/>
  <manifest:file-entry manifest:full-path="Pictures/100000000000037E0000038638906369A30B006D.jpg" manifest:media-type="image/jpeg"/>
  <manifest:file-entry manifest:full-path="Pictures/1000000000000445000002296F73EEE97951B93C.jpg" manifest:media-type="image/jpeg"/>
  <manifest:file-entry manifest:full-path="Pictures/10000000000001B700000141046ED5E2DB7D8F34.jpg" manifest:media-type="image/jpeg"/>
  <manifest:file-entry manifest:full-path="Pictures/10000000000001980000035AFD4A0653E194F543.jpg" manifest:media-type="image/jpeg"/>
  <manifest:file-entry manifest:full-path="Pictures/10000000000001DC0000012422D99805106240E1.jpg" manifest:media-type="image/jpeg"/>
  <manifest:file-entry manifest:full-path="Pictures/10000000000001F5000001200093E1AFD252F171.jpg" manifest:media-type="image/jpeg"/>
  <manifest:file-entry manifest:full-path="Pictures/1000000000000183000003575BC6E8C3902A8FD6.jpg" manifest:media-type="image/jpeg"/>
  <manifest:file-entry manifest:full-path="Pictures/10000000000001C80000016CFE99C9AA8CE00A4E.jpg" manifest:media-type="image/jpeg"/>
  <manifest:file-entry manifest:full-path="Pictures/10000000000001BB00000178BB4A7DF2839D0723.jpg" manifest:media-type="image/jpeg"/>
  <manifest:file-entry manifest:full-path="Pictures/10000000000001D30000018C59495C1D5A5D3869.jpg" manifest:media-type="image/jpeg"/>
  <manifest:file-entry manifest:full-path="Pictures/10000000000001BE000000BF94A23569A030D44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0d5d" officeooo:paragraph-rsid="00090d5d"/>
    </style:style>
    <style:style style:name="P2" style:family="paragraph" style:parent-style-name="Standard">
      <style:text-properties officeooo:rsid="00090d5d" officeooo:paragraph-rsid="00194c64"/>
    </style:style>
    <style:style style:name="P3" style:family="paragraph" style:parent-style-name="Standard">
      <style:text-properties officeooo:paragraph-rsid="00090d5d"/>
    </style:style>
    <style:style style:name="P4" style:family="paragraph" style:parent-style-name="Standard">
      <style:text-properties fo:font-size="22pt" fo:font-weight="bold" officeooo:rsid="00090d5d" officeooo:paragraph-rsid="00090d5d" style:font-size-asian="22pt" style:font-weight-asian="bold" style:font-size-complex="22pt" style:font-weight-complex="bold"/>
    </style:style>
    <style:style style:name="P5" style:family="paragraph" style:parent-style-name="Standard">
      <style:text-properties officeooo:rsid="000a6786" officeooo:paragraph-rsid="000a6786"/>
    </style:style>
    <style:style style:name="P6" style:family="paragraph" style:parent-style-name="Standard">
      <style:text-properties style:text-underline-style="none" fo:font-weight="bold" officeooo:rsid="000a6786" officeooo:paragraph-rsid="000a6786" fo:background-color="#ffff00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ab596" officeooo:paragraph-rsid="000ab596" fo:background-color="#ffff00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d94d5" officeooo:paragraph-rsid="000d94d5" fo:background-color="#ffff00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f7d77" officeooo:paragraph-rsid="000f7d77" fo:background-color="#ffff00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10dd16" officeooo:paragraph-rsid="0010dd16" fo:background-color="#ffff00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10dd16" officeooo:paragraph-rsid="0015282b" fo:background-color="#ffff00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35368" officeooo:paragraph-rsid="00135368" fo:background-color="#ffff00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9b52c" officeooo:paragraph-rsid="0019b52c" fo:background-color="#ffff00" style:font-weight-asian="bold" style:font-weight-complex="bold"/>
    </style:style>
    <style:style style:name="P14" style:family="paragraph" style:parent-style-name="Standard">
      <style:text-properties officeooo:paragraph-rsid="0010dd16"/>
    </style:style>
    <style:style style:name="P15" style:family="paragraph" style:parent-style-name="Standard">
      <style:text-properties officeooo:paragraph-rsid="0015282b"/>
    </style:style>
    <style:style style:name="P16" style:family="paragraph" style:parent-style-name="Standard">
      <style:text-properties officeooo:rsid="00194c64" officeooo:paragraph-rsid="00194c64"/>
    </style:style>
    <style:style style:name="P17" style:family="paragraph" style:parent-style-name="Standard">
      <style:text-properties officeooo:rsid="001b74d1" officeooo:paragraph-rsid="001b74d1"/>
    </style:style>
    <style:style style:name="P18" style:family="paragraph" style:parent-style-name="Standard">
      <style:text-properties officeooo:paragraph-rsid="001e687c"/>
    </style:style>
    <style:style style:name="P19" style:family="paragraph" style:parent-style-name="Standard">
      <style:text-properties officeooo:rsid="00090d5d" officeooo:paragraph-rsid="001f105c" fo:background-color="#ffffff"/>
    </style:style>
    <style:style style:name="P20" style:family="paragraph" style:parent-style-name="Standard">
      <style:text-properties style:text-underline-style="none" fo:font-weight="bold" officeooo:rsid="000c98cc" officeooo:paragraph-rsid="000c98cc" fo:background-color="#ffff00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1e687c" officeooo:paragraph-rsid="001e687c" fo:background-color="#ffff00" style:font-weight-asian="bold" style:font-weight-complex="bold"/>
    </style:style>
    <style:style style:name="T1" style:family="text">
      <style:text-properties officeooo:rsid="00090d5d"/>
    </style:style>
    <style:style style:name="T2" style:family="text">
      <style:text-properties officeooo:rsid="000a6786"/>
    </style:style>
    <style:style style:name="T3" style:family="text">
      <style:text-properties officeooo:rsid="000c98cc"/>
    </style:style>
    <style:style style:name="T4" style:family="text">
      <style:text-properties style:text-underline-style="none" fo:font-weight="bold" fo:background-color="#ffff00" loext:char-shading-value="0" style:font-weight-asian="bold" style:font-weight-complex="bold"/>
    </style:style>
    <style:style style:name="T5" style:family="text">
      <style:text-properties style:text-underline-style="none" fo:font-weight="bold" officeooo:rsid="0010dd16" fo:background-color="#ffff00" loext:char-shading-value="0" style:font-weight-asian="bold" style:font-weight-complex="bold"/>
    </style:style>
    <style:style style:name="T6" style:family="text">
      <style:text-properties style:text-underline-style="none" fo:font-weight="bold" officeooo:rsid="00129c5c" fo:background-color="#ffff00" loext:char-shading-value="0" style:font-weight-asian="bold" style:font-weight-complex="bold"/>
    </style:style>
    <style:style style:name="T7" style:family="text">
      <style:text-properties style:text-underline-style="none" fo:font-weight="bold" officeooo:rsid="0015282b" fo:background-color="#ffff00" loext:char-shading-value="0" style:font-weight-asian="bold" style:font-weight-complex="bold"/>
    </style:style>
    <style:style style:name="T8" style:family="text">
      <style:text-properties style:text-underline-style="none" fo:font-weight="bold" officeooo:rsid="0019b52c" fo:background-color="#ffff00" loext:char-shading-value="0" style:font-weight-asian="bold" style:font-weight-complex="bold"/>
    </style:style>
    <style:style style:name="T9" style:family="text">
      <style:text-properties style:text-underline-style="none" fo:font-weight="bold" officeooo:rsid="001e687c" fo:background-color="#ffff00" loext:char-shading-value="0" style:font-weight-asian="bold" style:font-weight-complex="bold"/>
    </style:style>
    <style:style style:name="T10" style:family="text">
      <style:text-properties style:text-underline-style="none" fo:font-weight="bold" officeooo:rsid="001e687c" style:font-weight-asian="bold" style:font-weight-complex="bold"/>
    </style:style>
    <style:style style:name="T11" style:family="text">
      <style:text-properties style:text-underline-style="none" fo:font-weight="normal" officeooo:rsid="0019b52c" style:font-weight-asian="normal" style:font-weight-complex="normal"/>
    </style:style>
    <style:style style:name="T12" style:family="text">
      <style:text-properties style:text-underline-style="none" fo:font-weight="normal" officeooo:rsid="001f105c" style:font-weight-asian="normal" style:font-weight-complex="normal"/>
    </style:style>
    <style:style style:name="T13" style:family="text">
      <style:text-properties officeooo:rsid="0010dd16"/>
    </style:style>
    <style:style style:name="T14" style:family="text">
      <style:text-properties officeooo:rsid="00129c5c"/>
    </style:style>
    <style:style style:name="T15" style:family="text">
      <style:text-properties officeooo:rsid="0019b52c"/>
    </style:style>
    <style:style style:name="T16" style:family="text">
      <style:text-properties officeooo:rsid="001e68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icketing System Set-<text:span text:style-name="T2">u</text:span>p <text:span text:style-name="T2">and Utilisation </text:span></text:p>
      <text:p text:style-name="P1"/>
      <text:p text:style-name="P3"><text:span text:style-name="T1">The </text:span><text:span text:style-name="T2">goal of</text:span><text:span text:style-name="T1"> this project is to allow me to gain confidence and familiarity with ticketing systems, which will help me to transfer the skills that I learn </text:span><text:span text:style-name="T2">here </text:span><text:span text:style-name="T1">into a real world IT environment. </text:span></text:p>
      <text:p text:style-name="P1"/>
      <text:p text:style-name="P6">1) I created a Linode account and set up my payment details</text:p>
      <text:p text:style-name="P5"><draw:frame draw:style-name="fr1" draw:name="Image1" text:anchor-type="char" svg:x="0.081cm" svg:y="0.279cm" svg:width="9.553cm" svg:height="12.1cm" draw:z-index="0"><draw:image xlink:href="Pictures/100000000000027A00000323854A65DD60A2AD8C.jpg" xlink:type="simple" xlink:show="embed" xlink:actuate="onLoad" draw:mime-type="image/jpe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2) I then navigated to my Cloud Manager and selected “Create”</text:p>
      <text:p text:style-name="P1"><draw:frame draw:style-name="fr1" draw:name="Image2" text:anchor-type="char" svg:x="-0.159cm" svg:y="0.169cm" svg:width="17cm" svg:height="5.547cm" draw:z-index="1"><draw:image xlink:href="Pictures/10000000000003F30000014A816F42A4D0C98E09.jpg" xlink:type="simple" xlink:show="embed" xlink:actuate="onLoad" draw:mime-type="image/jpeg"/></draw:frame></text:p>
      <text:p text:style-name="P1"/>
      <text:p text:style-name="P1"/>
      <text:p text:style-name="P1"/>
      <text:p text:style-name="P7">3) I then selected “Linode”</text:p>
      <text:p text:style-name="P7"/>
      <text:p text:style-name="P1"><draw:frame draw:style-name="fr3" draw:name="Image3" text:anchor-type="char" svg:width="17cm" svg:height="4.905cm" draw:z-index="2"><draw:image xlink:href="Pictures/100000000000043200000136D3A5018C283F7015.jpg" xlink:type="simple" xlink:show="embed" xlink:actuate="onLoad" draw:mime-type="image/jpeg"/></draw:frame><text:soft-page-break/></text:p>
      <text:p text:style-name="P7">4) <text:span text:style-name="T3">I then navigate to “Quick Deploy Apps” and search for “Peppermint”</text:span></text:p>
      <text:p text:style-name="P1"/>
      <text:p text:style-name="P1"><draw:frame draw:style-name="fr3" draw:name="Image4" text:anchor-type="char" svg:width="17cm" svg:height="6.121cm" draw:z-index="3"><draw:image xlink:href="Pictures/100000000000043E00000187FB5BFCD9EAC62C55.jpg" xlink:type="simple" xlink:show="embed" xlink:actuate="onLoad" draw:mime-type="image/jpeg"/></draw:frame></text:p>
      <text:p text:style-name="P20">5) I can now begin to set up Peppermint (API Token, Sub-Domain, Domain, Admin email address, region etc)</text:p>
      <text:p text:style-name="P1"><draw:frame draw:style-name="fr1" draw:name="Image5" text:anchor-type="char" svg:x="0.116cm" svg:y="0.24cm" svg:width="9.675cm" svg:height="10.545cm" draw:z-index="4"><draw:image xlink:href="Pictures/100000000000033600000380DD5E78FA7AD1D31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3">6</text:span>) The first part of the set-up has now been complete </text:p>
      <text:p text:style-name="P1"><text:soft-page-break/></text:p>
      <text:p text:style-name="P1"><draw:frame draw:style-name="fr3" draw:name="Image6" text:anchor-type="char" svg:width="17cm" svg:height="9.7cm" draw:z-index="5"><draw:image xlink:href="Pictures/100000000000034B000001E191B8B8799D6B6601.jpg" xlink:type="simple" xlink:show="embed" xlink:actuate="onLoad" draw:mime-type="image/jpeg"/></draw:frame></text:p>
      <text:p text:style-name="P1"/>
      <text:p text:style-name="P8">7) I can now begin the second part of the set-up by launching the LISH Console</text:p>
      <text:p text:style-name="P1"/>
      <text:p text:style-name="P1"><draw:frame draw:style-name="fr3" draw:name="Image7" text:anchor-type="char" svg:width="17cm" svg:height="6.622cm" draw:z-index="6"><draw:image xlink:href="Pictures/100000000000033800000141059D8A352FA7555E.jpg" xlink:type="simple" xlink:show="embed" xlink:actuate="onLoad" draw:mime-type="image/jpeg"/></draw:frame></text:p>
      <text:p text:style-name="P8">8) I begin by logging into the root account</text:p>
      <text:p text:style-name="P1"><draw:frame draw:style-name="fr1" draw:name="Image8" text:anchor-type="char" svg:x="-0.42cm" svg:y="0.191cm" svg:width="13.095cm" svg:height="6.632cm" draw:z-index="7"><draw:image xlink:href="Pictures/10000000000002BE000001ED0D0B9B266D1264CE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9) <text:span text:style-name="T13">I check to see if Docker is present using “docker ps”</text:span> </text:p>
      <text:p text:style-name="P9"/>
      <text:p text:style-name="P1"/>
      <text:p text:style-name="P1"><draw:frame draw:style-name="fr3" draw:name="Image9" text:anchor-type="char" svg:width="17cm" svg:height="3.445cm" draw:z-index="8"><draw:image xlink:href="Pictures/10000000000002E9000000971689D1FD179F2EB6.jpg" xlink:type="simple" xlink:show="embed" xlink:actuate="onLoad" draw:mime-type="image/jpeg"/></draw:frame></text:p>
      <text:p text:style-name="P12">10) I then make a directory for peppermint</text:p>
      <text:p text:style-name="P10"/>
      <text:p text:style-name="P10"><draw:frame draw:style-name="fr1" draw:name="Image12" text:anchor-type="char" svg:x="-0.046cm" svg:y="0cm" svg:width="13.229cm" svg:height="1.323cm" draw:z-index="11"><draw:image xlink:href="Pictures/10000000000001F400000032976CFF2E08986AD6.jpg" xlink:type="simple" xlink:show="embed" xlink:actuate="onLoad" draw:mime-type="image/jpeg"/></draw:frame></text:p>
      <text:p text:style-name="P10"/>
      <text:p text:style-name="P10"/>
      <text:p text:style-name="P10"/>
      <text:p text:style-name="P12">11) Then I create a yml file with nano</text:p>
      <text:p text:style-name="P10"><draw:frame draw:style-name="fr1" draw:name="Image13" text:anchor-type="char" svg:x="0.127cm" svg:y="0.196cm" svg:width="11.086cm" svg:height="0.847cm" draw:z-index="12"><draw:image xlink:href="Pictures/10000000000001A300000020105AC9406A91F7A7.jpg" xlink:type="simple" xlink:show="embed" xlink:actuate="onLoad" draw:mime-type="image/jpeg"/></draw:frame></text:p>
      <text:p text:style-name="P10"/>
      <text:p text:style-name="P10"/>
      <text:p text:style-name="P14"><text:span text:style-name="T5">1</text:span><text:span text:style-name="T7">2</text:span><text:span text:style-name="T5">) I then go to the Reverse DNS in the Network tab</text:span></text:p>
      <text:p text:style-name="P1"><draw:frame draw:style-name="fr1" draw:name="Image10" text:anchor-type="char" svg:x="-0.312cm" svg:y="0.381cm" svg:width="16.843cm" svg:height="13.608cm" draw:z-index="9"><draw:image xlink:href="Pictures/100000000000033C0000029D74D09E70C860D1EC.jpg" xlink:type="simple" xlink:show="embed" xlink:actuate="onLoad" draw:mime-type="image/jpeg"/></draw:frame></text:p>
      <text:p text:style-name="P11"><text:soft-page-break/></text:p>
      <text:p text:style-name="P15"><text:span text:style-name="T7">13</text:span><text:span text:style-name="T5">) I then copy the Reverse DNS and paste it into the browser with port 3000 – which navigates me to the Peppermint Login Page</text:span></text:p>
      <text:p text:style-name="P1"><draw:frame draw:style-name="fr1" draw:name="Image11" text:anchor-type="char" svg:x="1.836cm" svg:y="0.833cm" svg:width="14.259cm" svg:height="12.799cm" draw:z-index="10"><draw:image xlink:href="Pictures/100000000000037E0000038638906369A30B006D.jpg" xlink:type="simple" xlink:show="embed" xlink:actuate="onLoad" draw:mime-type="image/jpeg"/></draw:frame></text:p>
      <text:p text:style-name="P1"/>
      <text:p text:style-name="P16"><text:span text:style-name="T5">1</text:span><text:span text:style-name="T4">4) Once logged in, I can then begin to create, assign and complete ticket</text:span><text:span text:style-name="T8">s </text:span></text:p>
      <text:p text:style-name="P2"/>
      <text:p text:style-name="P2"><draw:frame draw:style-name="fr2" draw:name="Image14" text:anchor-type="char" svg:width="17cm" svg:height="8.601cm" draw:z-index="13"><draw:image xlink:href="Pictures/1000000000000445000002296F73EEE97951B93C.jpg" xlink:type="simple" xlink:show="embed" xlink:actuate="onLoad" draw:mime-type="image/jpeg"/></draw:frame></text:p>
      <text:p text:style-name="P13"><text:soft-page-break/><text:span text:style-name="T14">1</text:span>5) Example Ticket <text:span text:style-name="T16">(1) – Password Reset</text:span>:</text:p>
      <text:p text:style-name="P1"/>
      <text:p text:style-name="P1">- <text:span text:style-name="T15">Ticket Creation: </text:span></text:p>
      <text:p text:style-name="P1"><draw:frame draw:style-name="fr1" draw:name="Image15" text:anchor-type="char" svg:x="-0.185cm" svg:y="0.169cm" svg:width="7.105cm" svg:height="14.94cm" draw:z-index="14"><draw:image xlink:href="Pictures/10000000000001980000035AFD4A0653E194F543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Ticket Assignment:</text:p>
      <text:p text:style-name="P1"/>
      <text:p text:style-name="P1"/>
      <text:p text:style-name="P1"><draw:frame draw:style-name="fr1" draw:name="Image16" text:anchor-type="char" svg:x="-0.249cm" svg:y="0.191cm" svg:width="10.966cm" svg:height="7.168cm" draw:z-index="15"><draw:image xlink:href="Pictures/10000000000002020000015058B7B522FE4605D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7">Ticket Process:</text:p>
      <text:p text:style-name="P17"><draw:frame draw:style-name="fr1" draw:name="Image17" text:anchor-type="char" svg:x="0.206cm" svg:y="0.222cm" svg:width="11.615cm" svg:height="8.493cm" draw:z-index="16"><draw:image xlink:href="Pictures/10000000000001B700000141046ED5E2DB7D8F34.jpg" xlink:type="simple" xlink:show="embed" xlink:actuate="onLoad" draw:mime-type="image/jpeg"/></draw:frame></text:p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8" text:anchor-type="char" svg:x="0.483cm" svg:y="0.275cm" svg:width="12.594cm" svg:height="7.726cm" draw:z-index="17"><draw:image xlink:href="Pictures/10000000000001DC0000012422D99805106240E1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9" text:anchor-type="char" svg:x="0.762cm" svg:y="0.573cm" svg:width="13.256cm" svg:height="7.62cm" draw:z-index="18"><draw:image xlink:href="Pictures/10000000000001F5000001200093E1AFD252F171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text:soft-page-break/><text:span text:style-name="T6">1</text:span><text:span text:style-name="T9">6</text:span><text:span text:style-name="T8">) Example Ticket </text:span><text:span text:style-name="T9">(2) – User Account Creation:</text:span></text:p>
      <text:p text:style-name="P21"/>
      <text:p text:style-name="P19"><text:span text:style-name="T10">- </text:span><text:span text:style-name="T11">Ticket Creation: </text:span></text:p>
      <text:p text:style-name="P21"><draw:frame draw:style-name="fr1" draw:name="Image25" text:anchor-type="char" svg:x="0.101cm" svg:y="0.43cm" svg:width="6.8cm" svg:height="15.021cm" draw:z-index="24"><draw:image xlink:href="Pictures/1000000000000183000003575BC6E8C3902A8FD6.jpg" xlink:type="simple" xlink:show="embed" xlink:actuate="onLoad" draw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><text:span text:style-name="T11">- </text:span><text:span text:style-name="T12">Ticket Assignment:</text:span></text:p>
      <text:p text:style-name="P21"/>
      <text:p text:style-name="P21"><draw:frame draw:style-name="fr1" draw:name="Image24" text:anchor-type="char" svg:x="-0.039cm" svg:y="0.086cm" svg:width="10.634cm" svg:height="8.488cm" draw:z-index="23"><draw:image xlink:href="Pictures/10000000000001C80000016CFE99C9AA8CE00A4E.jpg" xlink:type="simple" xlink:show="embed" xlink:actuate="onLoad" draw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><text:soft-page-break/><text:span text:style-name="T11">- </text:span><text:span text:style-name="T12">Ticket Process: </text:span></text:p>
      <text:p text:style-name="P21"><draw:frame draw:style-name="fr1" draw:name="Image23" text:anchor-type="char" svg:x="-0.549cm" svg:y="0.268cm" svg:width="11.603cm" svg:height="7.768cm" draw:z-index="22"><draw:image xlink:href="Pictures/100000000000026F000001A10683B365182FC73C.jpg" xlink:type="simple" xlink:show="embed" xlink:actuate="onLoad" draw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22" text:anchor-type="char" svg:x="-0.044cm" svg:y="0.36cm" svg:width="8.982cm" svg:height="7.622cm" draw:z-index="21"><draw:image xlink:href="Pictures/10000000000001BB00000178BB4A7DF2839D0723.jpg" xlink:type="simple" xlink:show="embed" xlink:actuate="onLoad" draw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21" text:anchor-type="char" svg:x="-0.078cm" svg:y="0.406cm" svg:width="11.483cm" svg:height="9.737cm" draw:z-index="20"><draw:image xlink:href="Pictures/10000000000001D30000018C59495C1D5A5D3869.jpg" xlink:type="simple" xlink:show="embed" xlink:actuate="onLoad" draw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20" text:anchor-type="char" svg:x="-0.561cm" svg:y="-0.997cm" svg:width="12.568cm" svg:height="10.795cm" draw:z-index="19"><draw:image xlink:href="Pictures/10000000000001DB0000019880E1C83B613C2C6F.jpg" xlink:type="simple" xlink:show="embed" xlink:actuate="onLoad" draw:mime-type="image/jpe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26" text:anchor-type="char" svg:x="-0.748cm" svg:y="1.034cm" svg:width="12.619cm" svg:height="5.405cm" draw:z-index="25"><draw:image xlink:href="Pictures/10000000000001BE000000BF94A23569A030D44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14T12:23:59.305000000</meta:creation-date>
    <dc:date>2026-05-14T15:26:55.716000000</dc:date>
    <meta:editing-duration>PT1H6M58S</meta:editing-duration>
    <meta:editing-cycles>9</meta:editing-cycles>
    <meta:generator>LibreOffice/7.0.3.1$Windows_X86_64 LibreOffice_project/d7547858d014d4cf69878db179d326fc3483e082</meta:generator>
    <meta:document-statistic meta:table-count="0" meta:image-count="26" meta:object-count="0" meta:page-count="10" meta:paragraph-count="24" meta:word-count="242" meta:character-count="1314" meta:non-whitespace-character-count="1085"/>
  </office:meta>
</office:document-meta>
</file>